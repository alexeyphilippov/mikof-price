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281d" officeooo:paragraph-rsid="0015281d"/>
    </style:style>
    <style:style style:name="P2" style:family="paragraph" style:parent-style-name="Standard">
      <style:text-properties fo:language="ru" fo:country="RU" officeooo:rsid="0015281d" officeooo:paragraph-rsid="0019bdd7"/>
    </style:style>
    <style:style style:name="T1" style:family="text">
      <style:text-properties officeooo:rsid="001568a9"/>
    </style:style>
    <style:style style:name="T2" style:family="text">
      <style:text-properties fo:language="en" fo:country="US" officeooo:rsid="001568a9"/>
    </style:style>
    <style:style style:name="T3" style:family="text">
      <style:text-properties officeooo:rsid="001767df"/>
    </style:style>
    <style:style style:name="T4" style:family="text">
      <style:text-properties fo:font-weight="bold" officeooo:rsid="001767df" style:font-weight-asian="bold" style:font-weight-complex="bold"/>
    </style:style>
    <style:style style:name="T5" style:family="text">
      <style:text-properties officeooo:rsid="001914f7"/>
    </style:style>
    <style:style style:name="T6" style:family="text">
      <style:text-properties fo:language="en" fo:country="US" officeooo:rsid="001914f7"/>
    </style:style>
    <style:style style:name="T7" style:family="text">
      <style:text-properties officeooo:rsid="0019bdd7"/>
    </style:style>
    <style:style style:name="T8" style:family="text">
      <style:text-properties fo:font-weight="bold" officeooo:rsid="001914f7" style:font-weight-asian="bold" style:font-weight-complex="bold"/>
    </style:style>
    <style:style style:name="T9" style:family="text">
      <style:text-properties fo:font-weight="bold" officeooo:rsid="0019bdd7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officeooo:rsid="0019bdd7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14f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мечания:</text:p>
      <text:p text:style-name="P1"/>
      <text:p text:style-name="P2">Генеральный директор<text:line-break/>1) в разделе Заявки <text:span text:style-name="T1">помимо информации об изменениях в сущностях я также хочу видеть сами сущности которые затрагиваются в заявке (видеть все атрибуты этих сущностей воззможно в виде карточки сущности) <text:line-break/>2) в заявке я хочу видеть ФИО автора заявки и ФИО всех сотрудников которые участвуют в согласовании заявки а не только роли <text:line-break/>3) в разделе услуги при переходе на карточку услуги я меня нет возможности редактировать \ архивировать услуги </text:span><text:a xlink:type="simple" xlink:href="http://localhost:5173/services/232" text:style-name="Internet_20_link" text:visited-style-name="Visited_20_Internet_20_Link"><text:span text:style-name="T1">http://localhost:5173/services/232</text:span></text:a><text:span text:style-name="T1"> <text:line-break/>4) в разделе пакеты </text:span><text:a xlink:type="simple" xlink:href="http://localhost:5173/packages/1" text:style-name="Internet_20_link" text:visited-style-name="Visited_20_Internet_20_Link"><text:span text:style-name="T1">http://localhost:5173/packages/1</text:span></text:a><text:span text:style-name="T1"> я вижу список </text:span><text:span text:style-name="T2">ID </text:span><text:span text:style-name="T1">услуг но не вижу их характеристик. </text:span><text:span text:style-name="T2">ID </text:span><text:span text:style-name="T1">сам по себе ничего не говорит. Я хочу иметь кликабельные услуги с карточкой услуг<text:line-break/>5) в разделе пакеты </text:span><text:a xlink:type="simple" xlink:href="http://localhost:5173/packages/1" text:style-name="Internet_20_link" text:visited-style-name="Visited_20_Internet_20_Link"><text:span text:style-name="T1">http://localhost:5173/packages/1</text:span></text:a><text:span text:style-name="T1"> я не могу создать новый пакет, переименовать текущий и деактиваировать, но мне нужна возможность добавлять услуги в пакеты и удалять сущности из пакетов. Также я хочу править цены пакетов <text:line-break/>6) </text:span><text:span text:style-name="T3">В разделе заявки я хочу сортировать и фильтровать все колонки </text:span><text:a xlink:type="simple" xlink:href="http://localhost:5173/requests" text:style-name="Internet_20_link" text:visited-style-name="Visited_20_Internet_20_Link"><text:span text:style-name="T3">http://localhost:5173/requests</text:span></text:a><text:span text:style-name="T3"> , дефолтная сортировка — по времени (новые вверху)<text:line-break/>7) </text:span><text:span text:style-name="T1"><text:s/></text:span><text:span text:style-name="T3">В разделе заявки я хочу в Отдельной рамке видеть только те заявки, которые нахоятся у меня на согласовании (это касается всех ролей Р1 </text:span><text:span text:style-name="T4">генеральный директор</text:span><text:span text:style-name="T3"> <text:s/>Р2 </text:span><text:span text:style-name="T4">финансовый директор Р3 медицинский директор </text:span><text:span text:style-name="T3">)</text:span><text:span text:style-name="T1"><text:line-break/></text:span><text:span text:style-name="T3">8) в разделе </text:span><text:a xlink:type="simple" xlink:href="http://localhost:5173/directories" text:style-name="Internet_20_link" text:visited-style-name="Visited_20_Internet_20_Link"><text:span text:style-name="T3">http://localhost:5173/directories</text:span></text:a><text:span text:style-name="T3"> справочники я могу вносить новы значения не во все справочники — это не правильно. Сделай единообразно для всех справочников<text:line-break/>9) <text:s/>в разделе </text:span><text:a xlink:type="simple" xlink:href="http://localhost:5173/directories" text:style-name="Internet_20_link" text:visited-style-name="Visited_20_Internet_20_Link"><text:span text:style-name="T3">http://localhost:5173/directories</text:span></text:a><text:span text:style-name="T3"> справочники я хочу вносить правки в существующие справочники и архивировать текущие значения (при этом при архивации должны архивироваться все св</text:span><text:span text:style-name="T5">яз</text:span><text:span text:style-name="T3">анные сущности в системе, перед выполнением архивации нужен алерет со списком связанных сущностей и отдельная кнопка для подтверждения действия)<text:line-break/>10) в разделе </text:span><text:a xlink:type="simple" xlink:href="http://localhost:5173/clinics" text:style-name="Internet_20_link" text:visited-style-name="Visited_20_Internet_20_Link"><text:span text:style-name="T3">http://localhost:5173/clinics</text:span></text:a><text:span text:style-name="T3"> Клиники нет возможности править \ архивировать существующие записи<text:line-break/>11) в разделе </text:span><text:a xlink:type="simple" xlink:href="http://localhost:5173/users" text:style-name="Internet_20_link" text:visited-style-name="Visited_20_Internet_20_Link"><text:span text:style-name="T3">http://localhost:5173/users</text:span></text:a><text:span text:style-name="T3"> мне нужна возможность сменить пароль для существующих пользователей. </text:span><text:span text:style-name="T5">Также нужна возможность просмотреть и скопировать пароль свой и других пользователей</text:span><text:span text:style-name="T3"><text:line-break/></text:span><text:span text:style-name="T5">12) в разделе аудит </text:span><text:a xlink:type="simple" xlink:href="http://localhost:5173/audit" text:style-name="Internet_20_link" text:visited-style-name="Visited_20_Internet_20_Link"><text:span text:style-name="T5">http://localhost:5173/audit</text:span></text:a><text:span text:style-name="T5"> вместо </text:span><text:span text:style-name="T6">ID </text:span><text:span text:style-name="T5">пользователя мне нужно ФИО<text:line-break/>13) в разделе аудит </text:span><text:a xlink:type="simple" xlink:href="http://localhost:5173/audit" text:style-name="Internet_20_link" text:visited-style-name="Visited_20_Internet_20_Link"><text:span text:style-name="T5">http://localhost:5173/audit</text:span></text:a><text:span text:style-name="T5"> </text:span><text:span text:style-name="T3"><text:s/>я хочу сортировать и фильтровать все колонки <text:s/>, дефолтная сортировка — по времени (новые вверху)<text:line-break/></text:span><text:span text:style-name="T5">14) в разделе аудит </text:span><text:a xlink:type="simple" xlink:href="http://localhost:5173/audit" text:style-name="Internet_20_link" text:visited-style-name="Visited_20_Internet_20_Link"><text:span text:style-name="T5">http://localhost:5173/audit</text:span></text:a><text:span text:style-name="T5"> <text:s/>и справочники </text:span><text:a xlink:type="simple" xlink:href="http://localhost:5173/directories" text:style-name="Internet_20_link" text:visited-style-name="Visited_20_Internet_20_Link"><text:span text:style-name="T5">http://localhost:5173/directories</text:span></text:a><text:span text:style-name="T5"> </text:span><text:span text:style-name="T3"><text:s/></text:span><text:span text:style-name="T5">и пакеты </text:span><text:a xlink:type="simple" xlink:href="http://localhost:5173/packages" text:style-name="Internet_20_link" text:visited-style-name="Visited_20_Internet_20_Link"><text:span text:style-name="T5">http://localhost:5173/packages</text:span></text:a><text:span text:style-name="T5"> </text:span><text:span text:style-name="T3"><text:s/></text:span><text:span text:style-name="T5">пропала кнопка вывохода из системы в левом нижнем углу. Кнопка выхода должна быть в каждом разделе.<text:line-break/><text:line-break/><text:line-break/></text:span><text:span text:style-name="T7">Для ролей </text:span><text:span text:style-name="T5">Р2 </text:span><text:span text:style-name="T8">финансовый директор </text:span><text:span text:style-name="T9">и <text:s/></text:span>Р3 <text:span text:style-name="T10">медицинский директор</text:span><text:span text:style-name="T9"> </text:span><text:span text:style-name="T11">нужно повторить формы для изменения\архивации и создания всех бизнес сущностей аналогично функционалу доступному Р1 </text:span><text:span text:style-name="T12">Генеральный директор. </text:span><text:span text:style-name="T11">Отличие только в том, что <text:s/>Р1 </text:span><text:span text:style-name="T12">Генеральный директор </text:span><text:span text:style-name="T11">может внести правки в форму моментально, а для ролей <text:s/></text:span><text:span text:style-name="T13">Р2 </text:span><text:span text:style-name="T8">финансовый директор </text:span><text:span text:style-name="T9">и <text:s/></text:span><text:span text:style-name="T12">Р3 </text:span><text:span text:style-name="T10">медицинский директор </text:span><text:span text:style-name="T11">правки должны порождать заявку на измененение, которая далее пойдет на согласовани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1:55:30.080234000</meta:creation-date>
    <dc:date>2026-06-10T14:21:34.732965500</dc:date>
    <meta:editing-duration>PT7M42S</meta:editing-duration>
    <meta:editing-cycles>1</meta:editing-cycles>
    <meta:document-statistic meta:table-count="0" meta:image-count="0" meta:object-count="0" meta:page-count="1" meta:paragraph-count="2" meta:word-count="405" meta:character-count="3022" meta:non-whitespace-character-count="2598"/>
    <meta:generator>LibreOffice/26.2.3.2$Windows_X86_64 LibreOffice_project/70e089b17412e4cb7773e41413306b17a2328c34</meta:generator>
  </office:meta>
</office:document-meta>
</file>